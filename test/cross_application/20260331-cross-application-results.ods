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6.219cm"/>
    </style:style>
    <style:style style:name="co6" style:family="table-column">
      <style:table-column-properties fo:break-before="auto" style:column-width="11.104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837cm"/>
    </style:style>
    <style:style style:name="co8" style:family="table-column">
      <style:table-column-properties fo:break-before="auto" style:column-width="10.996cm"/>
    </style:style>
    <style:style style:name="co9" style:family="table-column">
      <style:table-column-properties fo:break-before="auto" style:column-width="2.95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es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7" table:default-cell-style-name="Default"/>
        <table:table-row table:style-name="ro1">
          <table:table-cell table:style-name="ce4" office:value-type="string" calcext:value-type="string">
            <text:p>BEST MCC Pipeline Cross Application</text:p>
          </table:table-cell>
          <table:table-cell table:number-columns-repeated="19"/>
        </table:table-row>
        <table:table-row table:style-name="ro2">
          <table:table-cell table:style-name="ce5" office:value-type="string" calcext:value-type="string">
            <text:p><text:s/>from </text:p>
          </table:table-cell>
          <table:table-cell table:style-name="ce5" office:value-type="string" calcext:value-type="string">
            <text:p><text:s/>applied on </text:p>
          </table:table-cell>
          <table:table-cell table:style-name="ce5" office:value-type="string" calcext:value-type="string">
            <text:p><text:s/>original_score </text:p>
          </table:table-cell>
          <table:table-cell table:style-name="ce5" office:value-type="string" calcext:value-type="string">
            <text:p><text:s/>cross_score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05" calcext:value-type="float">
            <text:p>0,0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099" calcext:value-type="float">
            <text:p>0,009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881" calcext:value-type="float">
            <text:p>0,08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804" calcext:value-type="float">
            <text:p>0,08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1292" calcext:value-type="float">
            <text:p>0,129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132" calcext:value-type="float">
            <text:p>0,01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0206" calcext:value-type="float">
            <text:p>-0,02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338" calcext:value-type="float">
            <text:p>0,03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28" calcext:value-type="float">
            <text:p>0,02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3387" calcext:value-type="float">
            <text:p>0,33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0109" calcext:value-type="float">
            <text:p>-0,01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144" calcext:value-type="float">
            <text:p>0,01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757" calcext:value-type="float">
            <text:p>0,075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0076" calcext:value-type="float">
            <text:p>-0,007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1176" calcext:value-type="float">
            <text:p>-0,117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0704" calcext:value-type="float">
            <text:p>-0,07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597" calcext:value-type="float">
            <text:p>0,05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574" calcext:value-type="float">
            <text:p>0,057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2799" calcext:value-type="float">
            <text:p>-0,279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212" calcext:value-type="float">
            <text:p>0,02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325" calcext:value-type="float">
            <text:p>0,032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1187" calcext:value-type="float">
            <text:p>-0,11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2107" calcext:value-type="float">
            <text:p>0,21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0948" calcext:value-type="float">
            <text:p>-0,09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0404" calcext:value-type="float">
            <text:p>-0,04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781" calcext:value-type="float">
            <text:p>0,07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0127" calcext:value-type="float">
            <text:p>-0,01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2044" calcext:value-type="float">
            <text:p>-0,20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1687" calcext:value-type="float">
            <text:p>0,16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2388" calcext:value-type="float">
            <text:p>-0,23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106" calcext:value-type="float">
            <text:p>0,1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339" calcext:value-type="float">
            <text:p>0,03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342" calcext:value-type="float">
            <text:p>0,034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0934" calcext:value-type="float">
            <text:p>-0,093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239" calcext:value-type="float">
            <text:p>0,02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2605" calcext:value-type="float">
            <text:p>-0,26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1302" calcext:value-type="float">
            <text:p>-0,13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.0001" calcext:value-type="float">
            <text:p>-0,00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3" calcext:value-type="float">
            <text:p>0,00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204" calcext:value-type="float">
            <text:p>0,02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84" calcext:value-type="float">
            <text:p>0,008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412" calcext:value-type="float">
            <text:p>0,04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218" calcext:value-type="float">
            <text:p>0,02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.0144" calcext:value-type="float">
            <text:p>-0,01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.014" calcext:value-type="float">
            <text:p>-0,0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1011" calcext:value-type="float">
            <text:p>0,10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" calcext:value-type="float">
            <text:p>0,0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115" calcext:value-type="float">
            <text:p>0,1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192" calcext:value-type="float">
            <text:p>0,019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1478" calcext:value-type="float">
            <text:p>0,147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346" calcext:value-type="float">
            <text:p>0,034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792" calcext:value-type="float">
            <text:p>0,079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357" calcext:value-type="float">
            <text:p>0,035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773" calcext:value-type="float">
            <text:p>0,077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.015" calcext:value-type="float">
            <text:p>-0,0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504" calcext:value-type="float">
            <text:p>0,05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.0029" calcext:value-type="float">
            <text:p>-0,00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.0005" calcext:value-type="float">
            <text:p>-0,00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1393" calcext:value-type="float">
            <text:p>0,139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775" calcext:value-type="float">
            <text:p>0,077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147" calcext:value-type="float">
            <text:p>0,014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7" calcext:value-type="float">
            <text:p>0,0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282" calcext:value-type="float">
            <text:p>0,028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1085" calcext:value-type="float">
            <text:p>0,108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458" calcext:value-type="float">
            <text:p>0,045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1424" calcext:value-type="float">
            <text:p>0,14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762" calcext:value-type="float">
            <text:p>0,076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.0161" calcext:value-type="float">
            <text:p>-0,016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43" calcext:value-type="float">
            <text:p>0,004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.0097" calcext:value-type="float">
            <text:p>-0,00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874" calcext:value-type="float">
            <text:p>0,087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1219" calcext:value-type="float">
            <text:p>0,12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98" calcext:value-type="float">
            <text:p>0,009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98" calcext:value-type="float">
            <text:p>0,019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88" calcext:value-type="float">
            <text:p>0,00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305" calcext:value-type="float">
            <text:p>0,03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356" calcext:value-type="float">
            <text:p>0,03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67" calcext:value-type="float">
            <text:p>0,056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29" calcext:value-type="float">
            <text:p>0,01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1357" calcext:value-type="float">
            <text:p>0,135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1309" calcext:value-type="float">
            <text:p>0,13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6335" calcext:value-type="float">
            <text:p>0,63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79" calcext:value-type="float">
            <text:p>0,07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31" calcext:value-type="float">
            <text:p>0,00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68" calcext:value-type="float">
            <text:p>0,016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03" calcext:value-type="float">
            <text:p>0,00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9" calcext:value-type="float">
            <text:p>0,00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863" calcext:value-type="float">
            <text:p>0,086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639" calcext:value-type="float">
            <text:p>0,06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-0.7287" calcext:value-type="float">
            <text:p>-0,72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-0.0042" calcext:value-type="float">
            <text:p>-0,004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1" calcext:value-type="float">
            <text:p>0,00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-0.0015" calcext:value-type="float">
            <text:p>-0,00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3136" calcext:value-type="float">
            <text:p>0,313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783" calcext:value-type="float">
            <text:p>0,078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1038" calcext:value-type="float">
            <text:p>0,10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-0.0462" calcext:value-type="float">
            <text:p>-0,046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2068" calcext:value-type="float">
            <text:p>0,206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-0.009" calcext:value-type="float">
            <text:p>-0,0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209" calcext:value-type="float">
            <text:p>0,2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2089" calcext:value-type="float">
            <text:p>0,208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3858" calcext:value-type="float">
            <text:p>0,385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624" calcext:value-type="float">
            <text:p>0,06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-0.0469" calcext:value-type="float">
            <text:p>-0,046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272" calcext:value-type="float">
            <text:p>0,02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081" calcext:value-type="float">
            <text:p>0,00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704" calcext:value-type="float">
            <text:p>0,07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1238" calcext:value-type="float">
            <text:p>0,12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2063" calcext:value-type="float">
            <text:p>0,206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37" calcext:value-type="float">
            <text:p>0,0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451" calcext:value-type="float">
            <text:p>0,045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913" calcext:value-type="float">
            <text:p>0,09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559" calcext:value-type="float">
            <text:p>0,055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5417" calcext:value-type="float">
            <text:p>0,541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319" calcext:value-type="float">
            <text:p>0,03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273" calcext:value-type="float">
            <text:p>0,027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407" calcext:value-type="float">
            <text:p>0,04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411" calcext:value-type="float">
            <text:p>0,04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258" calcext:value-type="float">
            <text:p>0,025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3134" calcext:value-type="float">
            <text:p>0,313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748" calcext:value-type="float">
            <text:p>0,07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1548" calcext:value-type="float">
            <text:p>0,15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-0.045" calcext:value-type="float">
            <text:p>-0,04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1962" calcext:value-type="float">
            <text:p>0,196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-0.0058" calcext:value-type="float">
            <text:p>-0,005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-0.0569" calcext:value-type="float">
            <text:p>-0,056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5056" calcext:value-type="float">
            <text:p>0,50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64" calcext:value-type="float">
            <text:p>0,06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273" calcext:value-type="float">
            <text:p>0,027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1662" calcext:value-type="float">
            <text:p>0,166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1232" calcext:value-type="float">
            <text:p>0,12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4294" calcext:value-type="float">
            <text:p>0,42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1519" calcext:value-type="float">
            <text:p>0,15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4054" calcext:value-type="float">
            <text:p>0,405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2629" calcext:value-type="float">
            <text:p>0,26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-0.0798" calcext:value-type="float">
            <text:p>-0,079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-0.0515" calcext:value-type="float">
            <text:p>-0,05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2998" calcext:value-type="float">
            <text:p>0,299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2688" calcext:value-type="float">
            <text:p>0,26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3224" calcext:value-type="float">
            <text:p>0,32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383" calcext:value-type="float">
            <text:p>0,038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213" calcext:value-type="float">
            <text:p>0,02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129" calcext:value-type="float">
            <text:p>0,01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678" calcext:value-type="float">
            <text:p>0,067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1965" calcext:value-type="float">
            <text:p>0,19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3251" calcext:value-type="float">
            <text:p>0,325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481" calcext:value-type="float">
            <text:p>0,04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453" calcext:value-type="float">
            <text:p>0,045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287" calcext:value-type="float">
            <text:p>0,02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333" calcext:value-type="float">
            <text:p>0,03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2796" calcext:value-type="float">
            <text:p>0,279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131" calcext:value-type="float">
            <text:p>0,01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559" calcext:value-type="float">
            <text:p>0,055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687" calcext:value-type="float">
            <text:p>0,06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872" calcext:value-type="float">
            <text:p>0,08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084" calcext:value-type="float">
            <text:p>0,008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2521" calcext:value-type="float">
            <text:p>0,25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465" calcext:value-type="float">
            <text:p>0,04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1122" calcext:value-type="float">
            <text:p>0,112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-0.0312" calcext:value-type="float">
            <text:p>-0,03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1265" calcext:value-type="float">
            <text:p>0,12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-0.0068" calcext:value-type="float">
            <text:p>-0,006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-0.0214" calcext:value-type="float">
            <text:p>-0,02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3478" calcext:value-type="float">
            <text:p>0,347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673" calcext:value-type="float">
            <text:p>0,067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361" calcext:value-type="float">
            <text:p>0,036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758" calcext:value-type="float">
            <text:p>0,075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1207" calcext:value-type="float">
            <text:p>0,12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2365" calcext:value-type="float">
            <text:p>0,23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1063" calcext:value-type="float">
            <text:p>0,106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3265" calcext:value-type="float">
            <text:p>0,32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2027" calcext:value-type="float">
            <text:p>0,20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-0.0301" calcext:value-type="float">
            <text:p>-0,03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023" calcext:value-type="float">
            <text:p>0,002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1236" calcext:value-type="float">
            <text:p>0,123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1986" calcext:value-type="float">
            <text:p>0,19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3141" calcext:value-type="float">
            <text:p>0,31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223" calcext:value-type="float">
            <text:p>0,022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088" calcext:value-type="float">
            <text:p>0,00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586" calcext:value-type="float">
            <text:p>0,05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978" calcext:value-type="float">
            <text:p>0,097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168" calcext:value-type="float">
            <text:p>0,16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591" calcext:value-type="float">
            <text:p>0,059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193" calcext:value-type="float">
            <text:p>-0,019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11" calcext:value-type="float">
            <text:p>0,0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073" calcext:value-type="float">
            <text:p>0,007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319" calcext:value-type="float">
            <text:p>0,3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088" calcext:value-type="float">
            <text:p>-0,00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502" calcext:value-type="float">
            <text:p>0,05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455" calcext:value-type="float">
            <text:p>0,04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894" calcext:value-type="float">
            <text:p>0,08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071" calcext:value-type="float">
            <text:p>-0,007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009" calcext:value-type="float">
            <text:p>-0,00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2482" calcext:value-type="float">
            <text:p>-0,248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56" calcext:value-type="float">
            <text:p>-0,0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1253" calcext:value-type="float">
            <text:p>-0,125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527" calcext:value-type="float">
            <text:p>-0,05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453" calcext:value-type="float">
            <text:p>0,045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999" calcext:value-type="float">
            <text:p>-0,099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2191" calcext:value-type="float">
            <text:p>0,219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505" calcext:value-type="float">
            <text:p>0,05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239" calcext:value-type="float">
            <text:p>-0,02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364" calcext:value-type="float">
            <text:p>0,036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463" calcext:value-type="float">
            <text:p>-0,046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119" calcext:value-type="float">
            <text:p>-0,01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1367" calcext:value-type="float">
            <text:p>0,136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155" calcext:value-type="float">
            <text:p>0,01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942" calcext:value-type="float">
            <text:p>-0,094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1609" calcext:value-type="float">
            <text:p>0,16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1944" calcext:value-type="float">
            <text:p>0,19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441" calcext:value-type="float">
            <text:p>-0,04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701" calcext:value-type="float">
            <text:p>0,07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031" calcext:value-type="float">
            <text:p>0,00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1164" calcext:value-type="float">
            <text:p>-0,116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001" calcext:value-type="float">
            <text:p>-0,00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001" calcext:value-type="float">
            <text:p>-0,00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067" calcext:value-type="float">
            <text:p>0,006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066" calcext:value-type="float">
            <text:p>0,00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002" calcext:value-type="float">
            <text:p>-0,00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046" calcext:value-type="float">
            <text:p>-0,004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108" calcext:value-type="float">
            <text:p>-0,01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671" calcext:value-type="float">
            <text:p>0,067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021" calcext:value-type="float">
            <text:p>0,00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903" calcext:value-type="float">
            <text:p>0,09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127" calcext:value-type="float">
            <text:p>0,01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972" calcext:value-type="float">
            <text:p>0,09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294" calcext:value-type="float">
            <text:p>0,02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015" calcext:value-type="float">
            <text:p>0,00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259" calcext:value-type="float">
            <text:p>0,025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644" calcext:value-type="float">
            <text:p>0,06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119" calcext:value-type="float">
            <text:p>-0,01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428" calcext:value-type="float">
            <text:p>0,042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041" calcext:value-type="float">
            <text:p>-0,00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01" calcext:value-type="float">
            <text:p>-0,0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588" calcext:value-type="float">
            <text:p>0,05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1004" calcext:value-type="float">
            <text:p>0,10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004" calcext:value-type="float">
            <text:p>0,00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009" calcext:value-type="float">
            <text:p>-0,00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171" calcext:value-type="float">
            <text:p>0,017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162" calcext:value-type="float">
            <text:p>0,016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308" calcext:value-type="float">
            <text:p>0,03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806" calcext:value-type="float">
            <text:p>0,08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489" calcext:value-type="float">
            <text:p>0,048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144" calcext:value-type="float">
            <text:p>-0,01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094" calcext:value-type="float">
            <text:p>0,00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15" calcext:value-type="float">
            <text:p>-0,0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712" calcext:value-type="float">
            <text:p>0,07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179" calcext:value-type="float">
            <text:p>0,017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007" calcext:value-type="float">
            <text:p>-0,00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017" calcext:value-type="float">
            <text:p>-0,001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011" calcext:value-type="float">
            <text:p>-0,00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049" calcext:value-type="float">
            <text:p>-0,004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027" calcext:value-type="float">
            <text:p>-0,00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177" calcext:value-type="float">
            <text:p>-0,017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02" calcext:value-type="float">
            <text:p>-0,0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552" calcext:value-type="float">
            <text:p>-0,05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157" calcext:value-type="float">
            <text:p>-0,015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901" calcext:value-type="float">
            <text:p>0,09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224" calcext:value-type="float">
            <text:p>0,02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189" calcext:value-type="float">
            <text:p>-0,018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198" calcext:value-type="float">
            <text:p>-0,019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302" calcext:value-type="float">
            <text:p>-0,03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103" calcext:value-type="float">
            <text:p>0,01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311" calcext:value-type="float">
            <text:p>0,3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2" calcext:value-type="float">
            <text:p>-0,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388" calcext:value-type="float">
            <text:p>0,03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784" calcext:value-type="float">
            <text:p>0,078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207" calcext:value-type="float">
            <text:p>0,02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272" calcext:value-type="float">
            <text:p>-0,02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139" calcext:value-type="float">
            <text:p>0,01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2309" calcext:value-type="float">
            <text:p>0,23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1337" calcext:value-type="float">
            <text:p>0,13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905" calcext:value-type="float">
            <text:p>0,09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024" calcext:value-type="float">
            <text:p>-0,00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056" calcext:value-type="float">
            <text:p>0,00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2961" calcext:value-type="float">
            <text:p>0,296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288" calcext:value-type="float">
            <text:p>0,02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252" calcext:value-type="float">
            <text:p>0,02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1038" calcext:value-type="float">
            <text:p>0,10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798" calcext:value-type="float">
            <text:p>-0,079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788" calcext:value-type="float">
            <text:p>-0,07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222" calcext:value-type="float">
            <text:p>0,022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1021" calcext:value-type="float">
            <text:p>0,10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3391" calcext:value-type="float">
            <text:p>0,339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153" calcext:value-type="float">
            <text:p>-0,015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165" calcext:value-type="float">
            <text:p>0,01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0023" calcext:value-type="float">
            <text:p>-0,002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5" calcext:value-type="float">
            <text:p>0,0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3" calcext:value-type="float">
            <text:p>0,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351" calcext:value-type="float">
            <text:p>0,035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55" calcext:value-type="float">
            <text:p>0,0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124" calcext:value-type="float">
            <text:p>0,01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52" calcext:value-type="float">
            <text:p>0,00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1385" calcext:value-type="float">
            <text:p>0,138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4738" calcext:value-type="float">
            <text:p>0,47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1719" calcext:value-type="float">
            <text:p>0,17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0558" calcext:value-type="float">
            <text:p>-0,055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0044" calcext:value-type="float">
            <text:p>-0,00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1466" calcext:value-type="float">
            <text:p>-0,14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119" calcext:value-type="float">
            <text:p>-0,1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11" calcext:value-type="float">
            <text:p>0,00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2573" calcext:value-type="float">
            <text:p>0,257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855" calcext:value-type="float">
            <text:p>0,08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273" calcext:value-type="float">
            <text:p>0,027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733" calcext:value-type="float">
            <text:p>0,07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0952" calcext:value-type="float">
            <text:p>-0,09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09" calcext:value-type="float">
            <text:p>0,00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1441" calcext:value-type="float">
            <text:p>-0,14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2633" calcext:value-type="float">
            <text:p>-0,26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56" calcext:value-type="float">
            <text:p>0,00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67" calcext:value-type="float">
            <text:p>0,006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721" calcext:value-type="float">
            <text:p>0,07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0852" calcext:value-type="float">
            <text:p>-0,08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0359" calcext:value-type="float">
            <text:p>-0,035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297" calcext:value-type="float">
            <text:p>-0,2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1206" calcext:value-type="float">
            <text:p>0,12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87" calcext:value-type="float">
            <text:p>0,00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91" calcext:value-type="float">
            <text:p>0,009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3963" calcext:value-type="float">
            <text:p>0,396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0345" calcext:value-type="float">
            <text:p>-0,034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45" calcext:value-type="float">
            <text:p>0,004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77" calcext:value-type="float">
            <text:p>0,007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173" calcext:value-type="float">
            <text:p>0,017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023" calcext:value-type="float">
            <text:p>-0,002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183" calcext:value-type="float">
            <text:p>0,018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244" calcext:value-type="float">
            <text:p>0,02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099" calcext:value-type="float">
            <text:p>0,009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064" calcext:value-type="float">
            <text:p>0,006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194" calcext:value-type="float">
            <text:p>0,01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2216" calcext:value-type="float">
            <text:p>0,22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1379" calcext:value-type="float">
            <text:p>0,137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007" calcext:value-type="float">
            <text:p>-0,00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002" calcext:value-type="float">
            <text:p>-0,00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031" calcext:value-type="float">
            <text:p>-0,00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003" calcext:value-type="float">
            <text:p>0,00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006" calcext:value-type="float">
            <text:p>-0,00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2861" calcext:value-type="float">
            <text:p>0,286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472" calcext:value-type="float">
            <text:p>0,04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2101" calcext:value-type="float">
            <text:p>0,21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285" calcext:value-type="float">
            <text:p>0,028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2713" calcext:value-type="float">
            <text:p>0,27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598" calcext:value-type="float">
            <text:p>0,059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188" calcext:value-type="float">
            <text:p>-0,01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1272" calcext:value-type="float">
            <text:p>0,12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225" calcext:value-type="float">
            <text:p>0,022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038" calcext:value-type="float">
            <text:p>-0,00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238" calcext:value-type="float">
            <text:p>-0,02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318" calcext:value-type="float">
            <text:p>0,03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448" calcext:value-type="float">
            <text:p>0,04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439" calcext:value-type="float">
            <text:p>0,04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344" calcext:value-type="float">
            <text:p>0,03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5848" calcext:value-type="float">
            <text:p>0,58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128" calcext:value-type="float">
            <text:p>-0,012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101" calcext:value-type="float">
            <text:p>-0,01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1532" calcext:value-type="float">
            <text:p>0,15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17" calcext:value-type="float">
            <text:p>0,01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088" calcext:value-type="float">
            <text:p>0,00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05" calcext:value-type="float">
            <text:p>0,0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304" calcext:value-type="float">
            <text:p>0,03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356" calcext:value-type="float">
            <text:p>0,03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567" calcext:value-type="float">
            <text:p>0,056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129" calcext:value-type="float">
            <text:p>0,01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0043" calcext:value-type="float">
            <text:p>-0,004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1352" calcext:value-type="float">
            <text:p>0,13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1312" calcext:value-type="float">
            <text:p>0,13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72" calcext:value-type="float">
            <text:p>0,0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078" calcext:value-type="float">
            <text:p>0,007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06" calcext:value-type="float">
            <text:p>0,0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163" calcext:value-type="float">
            <text:p>0,016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006" calcext:value-type="float">
            <text:p>-0,0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042" calcext:value-type="float">
            <text:p>0,004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2576" calcext:value-type="float">
            <text:p>-0,257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0726" calcext:value-type="float">
            <text:p>-0,072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2083" calcext:value-type="float">
            <text:p>-0,208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0494" calcext:value-type="float">
            <text:p>-0,04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066" calcext:value-type="float">
            <text:p>0,00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2805" calcext:value-type="float">
            <text:p>-0,28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3244" calcext:value-type="float">
            <text:p>0,32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0295" calcext:value-type="float">
            <text:p>-0,029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794" calcext:value-type="float">
            <text:p>0,07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628" calcext:value-type="float">
            <text:p>0,062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1084" calcext:value-type="float">
            <text:p>-0,108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142" calcext:value-type="float">
            <text:p>0,014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2069" calcext:value-type="float">
            <text:p>0,206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891" calcext:value-type="float">
            <text:p>0,089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117" calcext:value-type="float">
            <text:p>-0,11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3038" calcext:value-type="float">
            <text:p>0,30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3115" calcext:value-type="float">
            <text:p>0,31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1137" calcext:value-type="float">
            <text:p>0,11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807" calcext:value-type="float">
            <text:p>0,08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115" calcext:value-type="float">
            <text:p>0,01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1633" calcext:value-type="float">
            <text:p>-0,16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139" calcext:value-type="float">
            <text:p>0,01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055" calcext:value-type="float">
            <text:p>0,00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342" calcext:value-type="float">
            <text:p>0,034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361" calcext:value-type="float">
            <text:p>0,036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586" calcext:value-type="float">
            <text:p>0,05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121" calcext:value-type="float">
            <text:p>0,01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349" calcext:value-type="float">
            <text:p>0,034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1355" calcext:value-type="float">
            <text:p>0,13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165" calcext:value-type="float">
            <text:p>0,1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006" calcext:value-type="float">
            <text:p>0,00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031" calcext:value-type="float">
            <text:p>0,00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042" calcext:value-type="float">
            <text:p>0,004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086" calcext:value-type="float">
            <text:p>0,00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3336" calcext:value-type="float">
            <text:p>0,333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812" calcext:value-type="float">
            <text:p>0,08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1995" calcext:value-type="float">
            <text:p>0,199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262" calcext:value-type="float">
            <text:p>0,026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2043" calcext:value-type="float">
            <text:p>0,204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713" calcext:value-type="float">
            <text:p>0,07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-0.0081" calcext:value-type="float">
            <text:p>-0,00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1137" calcext:value-type="float">
            <text:p>0,11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006" calcext:value-type="float">
            <text:p>0,00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-0.0229" calcext:value-type="float">
            <text:p>-0,02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805" calcext:value-type="float">
            <text:p>0,08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1193" calcext:value-type="float">
            <text:p>0,119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486" calcext:value-type="float">
            <text:p>0,04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579" calcext:value-type="float">
            <text:p>0,057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5928" calcext:value-type="float">
            <text:p>0,592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203" calcext:value-type="float">
            <text:p>0,02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-0.0117" calcext:value-type="float">
            <text:p>-0,011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1906" calcext:value-type="float">
            <text:p>0,19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016" calcext:value-type="float">
            <text:p>0,00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001" calcext:value-type="float">
            <text:p>-0,00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002" calcext:value-type="float">
            <text:p>-0,00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304" calcext:value-type="float">
            <text:p>0,03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814" calcext:value-type="float">
            <text:p>0,08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1376" calcext:value-type="float">
            <text:p>0,137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224" calcext:value-type="float">
            <text:p>0,02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241" calcext:value-type="float">
            <text:p>0,02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239" calcext:value-type="float">
            <text:p>0,02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1133" calcext:value-type="float">
            <text:p>0,11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029" calcext:value-type="float">
            <text:p>-0,00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207" calcext:value-type="float">
            <text:p>0,02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1997" calcext:value-type="float">
            <text:p>0,19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188" calcext:value-type="float">
            <text:p>0,1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16" calcext:value-type="float">
            <text:p>0,0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485" calcext:value-type="float">
            <text:p>0,048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829" calcext:value-type="float">
            <text:p>0,08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121" calcext:value-type="float">
            <text:p>-0,01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137" calcext:value-type="float">
            <text:p>0,01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129" calcext:value-type="float">
            <text:p>0,01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001" calcext:value-type="float">
            <text:p>-0,00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151" calcext:value-type="float">
            <text:p>0,015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1393" calcext:value-type="float">
            <text:p>0,139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008" calcext:value-type="float">
            <text:p>0,00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029" calcext:value-type="float">
            <text:p>0,00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471" calcext:value-type="float">
            <text:p>0,047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015" calcext:value-type="float">
            <text:p>0,00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266" calcext:value-type="float">
            <text:p>0,02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293" calcext:value-type="float">
            <text:p>0,029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235" calcext:value-type="float">
            <text:p>-0,02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254" calcext:value-type="float">
            <text:p>-0,025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26" calcext:value-type="float">
            <text:p>-0,02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463" calcext:value-type="float">
            <text:p>0,046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347" calcext:value-type="float">
            <text:p>0,034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009" calcext:value-type="float">
            <text:p>-0,00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255" calcext:value-type="float">
            <text:p>0,02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209" calcext:value-type="float">
            <text:p>0,02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018" calcext:value-type="float">
            <text:p>0,00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285" calcext:value-type="float">
            <text:p>0,028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716" calcext:value-type="float">
            <text:p>0,07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1031" calcext:value-type="float">
            <text:p>0,10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685" calcext:value-type="float">
            <text:p>0,068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12" calcext:value-type="float">
            <text:p>0,0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-0.0072" calcext:value-type="float">
            <text:p>-0,00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-0.0014" calcext:value-type="float">
            <text:p>-0,00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13" calcext:value-type="float">
            <text:p>0,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055" calcext:value-type="float">
            <text:p>0,00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1987" calcext:value-type="float">
            <text:p>0,19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2278" calcext:value-type="float">
            <text:p>0,227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067" calcext:value-type="float">
            <text:p>0,006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72" calcext:value-type="float">
            <text:p>0,0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378" calcext:value-type="float">
            <text:p>0,037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766" calcext:value-type="float">
            <text:p>0,07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-0.0178" calcext:value-type="float">
            <text:p>-0,017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807" calcext:value-type="float">
            <text:p>0,08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-0.0018" calcext:value-type="float">
            <text:p>-0,00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-0.0038" calcext:value-type="float">
            <text:p>-0,00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197" calcext:value-type="float">
            <text:p>0,1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288" calcext:value-type="float">
            <text:p>0,02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226" calcext:value-type="float">
            <text:p>0,022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66" calcext:value-type="float">
            <text:p>0,0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667" calcext:value-type="float">
            <text:p>0,066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483" calcext:value-type="float">
            <text:p>0,048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621" calcext:value-type="float">
            <text:p>0,06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2081" calcext:value-type="float">
            <text:p>0,20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1054" calcext:value-type="float">
            <text:p>0,105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-0.0124" calcext:value-type="float">
            <text:p>-0,01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23" calcext:value-type="float">
            <text:p>0,02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133" calcext:value-type="float">
            <text:p>0,01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809" calcext:value-type="float">
            <text:p>0,08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1089" calcext:value-type="float">
            <text:p>0,108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326" calcext:value-type="float">
            <text:p>0,032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372" calcext:value-type="float">
            <text:p>0,03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15" calcext:value-type="float">
            <text:p>0,0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031" calcext:value-type="float">
            <text:p>0,00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508" calcext:value-type="float">
            <text:p>0,05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868" calcext:value-type="float">
            <text:p>0,086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179" calcext:value-type="float">
            <text:p>0,17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716" calcext:value-type="float">
            <text:p>0,07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088" calcext:value-type="float">
            <text:p>0,00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-0.062" calcext:value-type="float">
            <text:p>-0,06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122" calcext:value-type="float">
            <text:p>0,012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2048" calcext:value-type="float">
            <text:p>0,20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005" calcext:value-type="float">
            <text:p>0,00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2744" calcext:value-type="float">
            <text:p>0,27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2394" calcext:value-type="float">
            <text:p>0,23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127" calcext:value-type="float">
            <text:p>0,01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804" calcext:value-type="float">
            <text:p>0,08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1081" calcext:value-type="float">
            <text:p>0,10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2408" calcext:value-type="float">
            <text:p>0,24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-0.0431" calcext:value-type="float">
            <text:p>-0,04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14" calcext:value-type="float">
            <text:p>0,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-0.0322" calcext:value-type="float">
            <text:p>-0,032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131" calcext:value-type="float">
            <text:p>0,01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3397" calcext:value-type="float">
            <text:p>0,33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391" calcext:value-type="float">
            <text:p>0,039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423" calcext:value-type="float">
            <text:p>0,042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1426" calcext:value-type="float">
            <text:p>0,142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2006" calcext:value-type="float">
            <text:p>0,20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881" calcext:value-type="float">
            <text:p>0,08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101" calcext:value-type="float">
            <text:p>0,1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5685" calcext:value-type="float">
            <text:p>0,568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2518" calcext:value-type="float">
            <text:p>0,25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-0.069" calcext:value-type="float">
            <text:p>-0,06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108" calcext:value-type="float">
            <text:p>0,01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081" calcext:value-type="float">
            <text:p>0,00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1876" calcext:value-type="float">
            <text:p>0,187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905" calcext:value-type="float">
            <text:p>0,09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982" calcext:value-type="float">
            <text:p>0,098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057" calcext:value-type="float">
            <text:p>0,005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002" calcext:value-type="float">
            <text:p>-0,00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005" calcext:value-type="float">
            <text:p>0,00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406" calcext:value-type="float">
            <text:p>0,04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895" calcext:value-type="float">
            <text:p>0,089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1586" calcext:value-type="float">
            <text:p>0,15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241" calcext:value-type="float">
            <text:p>0,02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256" calcext:value-type="float">
            <text:p>0,02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248" calcext:value-type="float">
            <text:p>0,02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1186" calcext:value-type="float">
            <text:p>0,11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03" calcext:value-type="float">
            <text:p>-0,0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759" calcext:value-type="float">
            <text:p>0,075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269" calcext:value-type="float">
            <text:p>0,026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1743" calcext:value-type="float">
            <text:p>0,174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149" calcext:value-type="float">
            <text:p>0,014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528" calcext:value-type="float">
            <text:p>0,052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876" calcext:value-type="float">
            <text:p>0,087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115" calcext:value-type="float">
            <text:p>-0,01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123" calcext:value-type="float">
            <text:p>0,012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147" calcext:value-type="float">
            <text:p>0,014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001" calcext:value-type="float">
            <text:p>-0,00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195" calcext:value-type="float">
            <text:p>0,019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1381" calcext:value-type="float">
            <text:p>0,13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002" calcext:value-type="float">
            <text:p>-0,00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033" calcext:value-type="float">
            <text:p>0,00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744" calcext:value-type="float">
            <text:p>0,07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032" calcext:value-type="float">
            <text:p>0,00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406" calcext:value-type="float">
            <text:p>0,04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105" calcext:value-type="float">
            <text:p>0,01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19" calcext:value-type="float">
            <text:p>-0,0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291" calcext:value-type="float">
            <text:p>-0,029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292" calcext:value-type="float">
            <text:p>-0,029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507" calcext:value-type="float">
            <text:p>0,05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403" calcext:value-type="float">
            <text:p>0,04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008" calcext:value-type="float">
            <text:p>-0,00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012" calcext:value-type="float">
            <text:p>0,00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12" calcext:value-type="float">
            <text:p>-0,00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08" calcext:value-type="float">
            <text:p>-0,00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36" calcext:value-type="float">
            <text:p>-0,003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24" calcext:value-type="float">
            <text:p>-0,00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12" calcext:value-type="float">
            <text:p>-0,0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13" calcext:value-type="float">
            <text:p>-0,00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867" calcext:value-type="float">
            <text:p>0,086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303" calcext:value-type="float">
            <text:p>-0,03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139" calcext:value-type="float">
            <text:p>-0,01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386" calcext:value-type="float">
            <text:p>0,03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315" calcext:value-type="float">
            <text:p>0,03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87" calcext:value-type="float">
            <text:p>-0,00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129" calcext:value-type="float">
            <text:p>-0,01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82" calcext:value-type="float">
            <text:p>-0,008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109" calcext:value-type="float">
            <text:p>0,01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512" calcext:value-type="float">
            <text:p>0,05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956" calcext:value-type="float">
            <text:p>0,09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21" calcext:value-type="float">
            <text:p>0,0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287" calcext:value-type="float">
            <text:p>0,02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231" calcext:value-type="float">
            <text:p>-0,02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131" calcext:value-type="float">
            <text:p>-0,01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2074" calcext:value-type="float">
            <text:p>0,207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182" calcext:value-type="float">
            <text:p>0,18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639" calcext:value-type="float">
            <text:p>0,06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14" calcext:value-type="float">
            <text:p>-0,00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5979" calcext:value-type="float">
            <text:p>0,597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113" calcext:value-type="float">
            <text:p>0,01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268" calcext:value-type="float">
            <text:p>0,026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728" calcext:value-type="float">
            <text:p>0,072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594" calcext:value-type="float">
            <text:p>-0,05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596" calcext:value-type="float">
            <text:p>-0,059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056" calcext:value-type="float">
            <text:p>0,00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698" calcext:value-type="float">
            <text:p>0,069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1028" calcext:value-type="float">
            <text:p>0,102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66" calcext:value-type="float">
            <text:p>-0,00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146" calcext:value-type="float">
            <text:p>-0,014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089" calcext:value-type="float">
            <text:p>-0,008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055" calcext:value-type="float">
            <text:p>-0,00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282" calcext:value-type="float">
            <text:p>-0,028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337" calcext:value-type="float">
            <text:p>-0,03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523" calcext:value-type="float">
            <text:p>-0,052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114" calcext:value-type="float">
            <text:p>-0,01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0044" calcext:value-type="float">
            <text:p>0,00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0244" calcext:value-type="float">
            <text:p>0,02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1211" calcext:value-type="float">
            <text:p>-0,12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4843" calcext:value-type="float">
            <text:p>-0,484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586" calcext:value-type="float">
            <text:p>-0,05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0105" calcext:value-type="float">
            <text:p>0,01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0095" calcext:value-type="float">
            <text:p>0,009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0309" calcext:value-type="float">
            <text:p>0,03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099" calcext:value-type="float">
            <text:p>-0,009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032" calcext:value-type="float">
            <text:p>-0,00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1911" calcext:value-type="float">
            <text:p>0,19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2699" calcext:value-type="float">
            <text:p>0,269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0918" calcext:value-type="float">
            <text:p>0,09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411" calcext:value-type="float">
            <text:p>-0,04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1725" calcext:value-type="float">
            <text:p>0,172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3222" calcext:value-type="float">
            <text:p>-0,322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0305" calcext:value-type="float">
            <text:p>0,03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68" calcext:value-type="float">
            <text:p>-0,06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725" calcext:value-type="float">
            <text:p>-0,072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0854" calcext:value-type="float">
            <text:p>0,085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626" calcext:value-type="float">
            <text:p>-0,062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1667" calcext:value-type="float">
            <text:p>-0,166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1347" calcext:value-type="float">
            <text:p>-0,134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1778" calcext:value-type="float">
            <text:p>0,177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1927" calcext:value-type="float">
            <text:p>-0,19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1931" calcext:value-type="float">
            <text:p>-0,19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2317" calcext:value-type="float">
            <text:p>-0,231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331" calcext:value-type="float">
            <text:p>-0,03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11" calcext:value-type="float">
            <text:p>-0,0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2032" calcext:value-type="float">
            <text:p>0,20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161" calcext:value-type="float">
            <text:p>0,016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119" calcext:value-type="float">
            <text:p>0,01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-0.0008" calcext:value-type="float">
            <text:p>-0,00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-0.0027" calcext:value-type="float">
            <text:p>-0,00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073" calcext:value-type="float">
            <text:p>0,007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085" calcext:value-type="float">
            <text:p>0,008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224" calcext:value-type="float">
            <text:p>0,02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25" calcext:value-type="float">
            <text:p>0,02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141" calcext:value-type="float">
            <text:p>0,01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934" calcext:value-type="float">
            <text:p>0,093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-0.0022" calcext:value-type="float">
            <text:p>-0,002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-0.1225" calcext:value-type="float">
            <text:p>-0,122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476" calcext:value-type="float">
            <text:p>0,047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542" calcext:value-type="float">
            <text:p>0,054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669" calcext:value-type="float">
            <text:p>0,066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651" calcext:value-type="float">
            <text:p>0,065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693" calcext:value-type="float">
            <text:p>0,069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1575" calcext:value-type="float">
            <text:p>0,157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-0.0706" calcext:value-type="float">
            <text:p>-0,07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1696" calcext:value-type="float">
            <text:p>0,169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175" calcext:value-type="float">
            <text:p>0,017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262" calcext:value-type="float">
            <text:p>0,026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2074" calcext:value-type="float">
            <text:p>0,207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2491" calcext:value-type="float">
            <text:p>0,249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113" calcext:value-type="float">
            <text:p>0,01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057" calcext:value-type="float">
            <text:p>0,005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543" calcext:value-type="float">
            <text:p>0,054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1856" calcext:value-type="float">
            <text:p>0,18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731" calcext:value-type="float">
            <text:p>0,07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1827" calcext:value-type="float">
            <text:p>0,18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3348" calcext:value-type="float">
            <text:p>0,33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635" calcext:value-type="float">
            <text:p>0,06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-0.0151" calcext:value-type="float">
            <text:p>-0,015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-0.0525" calcext:value-type="float">
            <text:p>-0,052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2222" calcext:value-type="float">
            <text:p>0,222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563" calcext:value-type="float">
            <text:p>0,056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-0.0302" calcext:value-type="float">
            <text:p>-0,03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143" calcext:value-type="float">
            <text:p>-0,014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088" calcext:value-type="float">
            <text:p>-0,00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05" calcext:value-type="float">
            <text:p>-0,0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301" calcext:value-type="float">
            <text:p>-0,03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353" calcext:value-type="float">
            <text:p>-0,035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531" calcext:value-type="float">
            <text:p>-0,05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127" calcext:value-type="float">
            <text:p>-0,01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0025" calcext:value-type="float">
            <text:p>0,002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1054" calcext:value-type="float">
            <text:p>-0,105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122" calcext:value-type="float">
            <text:p>-0,12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6018" calcext:value-type="float">
            <text:p>-0,60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74" calcext:value-type="float">
            <text:p>-0,07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013" calcext:value-type="float">
            <text:p>0,0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0037" calcext:value-type="float">
            <text:p>0,00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0228" calcext:value-type="float">
            <text:p>0,022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0035" calcext:value-type="float">
            <text:p>0,00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009" calcext:value-type="float">
            <text:p>-0,00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2757" calcext:value-type="float">
            <text:p>0,275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1235" calcext:value-type="float">
            <text:p>0,12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0383" calcext:value-type="float">
            <text:p>0,038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192" calcext:value-type="float">
            <text:p>-0,019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2054" calcext:value-type="float">
            <text:p>0,205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3026" calcext:value-type="float">
            <text:p>-0,302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0146" calcext:value-type="float">
            <text:p>0,014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718" calcext:value-type="float">
            <text:p>-0,07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647" calcext:value-type="float">
            <text:p>-0,064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1239" calcext:value-type="float">
            <text:p>0,12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032" calcext:value-type="float">
            <text:p>-0,00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195" calcext:value-type="float">
            <text:p>-0,19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116" calcext:value-type="float">
            <text:p>-0,01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1203" calcext:value-type="float">
            <text:p>0,12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3401" calcext:value-type="float">
            <text:p>-0,34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3501" calcext:value-type="float">
            <text:p>-0,35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3658" calcext:value-type="float">
            <text:p>-0,365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55" calcext:value-type="float">
            <text:p>-0,0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165" calcext:value-type="float">
            <text:p>-0,01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1825" calcext:value-type="float">
            <text:p>0,182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201" calcext:value-type="float">
            <text:p>0,02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087" calcext:value-type="float">
            <text:p>0,00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088" calcext:value-type="float">
            <text:p>0,00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437" calcext:value-type="float">
            <text:p>0,04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407" calcext:value-type="float">
            <text:p>0,04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643" calcext:value-type="float">
            <text:p>0,064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132" calcext:value-type="float">
            <text:p>0,01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016" calcext:value-type="float">
            <text:p>0,00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1341" calcext:value-type="float">
            <text:p>0,13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1301" calcext:value-type="float">
            <text:p>0,13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6294" calcext:value-type="float">
            <text:p>0,62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1118" calcext:value-type="float">
            <text:p>0,11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13" calcext:value-type="float">
            <text:p>0,0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122" calcext:value-type="float">
            <text:p>0,012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23" calcext:value-type="float">
            <text:p>0,02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3" calcext:value-type="float">
            <text:p>0,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806" calcext:value-type="float">
            <text:p>0,08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597" calcext:value-type="float">
            <text:p>0,05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1898" calcext:value-type="float">
            <text:p>0,189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-0.0873" calcext:value-type="float">
            <text:p>-0,087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053" calcext:value-type="float">
            <text:p>0,005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752" calcext:value-type="float">
            <text:p>0,07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5375" calcext:value-type="float">
            <text:p>0,537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06" calcext:value-type="float">
            <text:p>0,0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113" calcext:value-type="float">
            <text:p>0,1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3865" calcext:value-type="float">
            <text:p>0,38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1852" calcext:value-type="float">
            <text:p>0,18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143" calcext:value-type="float">
            <text:p>0,014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2031" calcext:value-type="float">
            <text:p>0,20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841" calcext:value-type="float">
            <text:p>0,08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124" calcext:value-type="float">
            <text:p>0,1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156" calcext:value-type="float">
            <text:p>0,01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204" calcext:value-type="float">
            <text:p>0,02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5034" calcext:value-type="float">
            <text:p>0,503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2269" calcext:value-type="float">
            <text:p>0,226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935" calcext:value-type="float">
            <text:p>0,09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952" calcext:value-type="float">
            <text:p>0,09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0018" calcext:value-type="float">
            <text:p>0,00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087" calcext:value-type="float">
            <text:p>-0,00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05" calcext:value-type="float">
            <text:p>-0,0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103" calcext:value-type="float">
            <text:p>-0,01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472" calcext:value-type="float">
            <text:p>-0,04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0012" calcext:value-type="float">
            <text:p>0,00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02" calcext:value-type="float">
            <text:p>-0,0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015" calcext:value-type="float">
            <text:p>-0,00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0015" calcext:value-type="float">
            <text:p>0,00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16" calcext:value-type="float">
            <text:p>-0,0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0007" calcext:value-type="float">
            <text:p>0,00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414" calcext:value-type="float">
            <text:p>-0,04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251" calcext:value-type="float">
            <text:p>-0,025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978" calcext:value-type="float">
            <text:p>-0,097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79" calcext:value-type="float">
            <text:p>-0,07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687" calcext:value-type="float">
            <text:p>-0,06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2115" calcext:value-type="float">
            <text:p>0,21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538" calcext:value-type="float">
            <text:p>-0,05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462" calcext:value-type="float">
            <text:p>-0,046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3394" calcext:value-type="float">
            <text:p>-0,33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4479" calcext:value-type="float">
            <text:p>-0,447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0266" calcext:value-type="float">
            <text:p>0,02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1393" calcext:value-type="float">
            <text:p>-0,139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1176" calcext:value-type="float">
            <text:p>-0,117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1932" calcext:value-type="float">
            <text:p>-0,19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1281" calcext:value-type="float">
            <text:p>-0,12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678" calcext:value-type="float">
            <text:p>-0,067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0153" calcext:value-type="float">
            <text:p>0,015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555" calcext:value-type="float">
            <text:p>-0,05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96" calcext:value-type="float">
            <text:p>-0,09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1265" calcext:value-type="float">
            <text:p>0,12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137" calcext:value-type="float">
            <text:p>-0,1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3024" calcext:value-type="float">
            <text:p>-0,30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0251" calcext:value-type="float">
            <text:p>0,025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189" calcext:value-type="float">
            <text:p>0,018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055" calcext:value-type="float">
            <text:p>0,00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342" calcext:value-type="float">
            <text:p>0,034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361" calcext:value-type="float">
            <text:p>0,036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587" calcext:value-type="float">
            <text:p>0,05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122" calcext:value-type="float">
            <text:p>0,012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-0.0552" calcext:value-type="float">
            <text:p>-0,05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55" calcext:value-type="float">
            <text:p>0,0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4935" calcext:value-type="float">
            <text:p>0,49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876" calcext:value-type="float">
            <text:p>0,087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09" calcext:value-type="float">
            <text:p>0,0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-0.0029" calcext:value-type="float">
            <text:p>-0,00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164" calcext:value-type="float">
            <text:p>0,016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087" calcext:value-type="float">
            <text:p>0,00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094" calcext:value-type="float">
            <text:p>0,00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2936" calcext:value-type="float">
            <text:p>0,293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824" calcext:value-type="float">
            <text:p>0,08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1715" calcext:value-type="float">
            <text:p>0,17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412" calcext:value-type="float">
            <text:p>0,04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-0.0361" calcext:value-type="float">
            <text:p>-0,036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1257" calcext:value-type="float">
            <text:p>0,125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-0.0533" calcext:value-type="float">
            <text:p>-0,05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1121" calcext:value-type="float">
            <text:p>0,11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833" calcext:value-type="float">
            <text:p>0,08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188" calcext:value-type="float">
            <text:p>0,01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-0.0463" calcext:value-type="float">
            <text:p>-0,046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877" calcext:value-type="float">
            <text:p>0,087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1351" calcext:value-type="float">
            <text:p>0,135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309" calcext:value-type="float">
            <text:p>0,03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497" calcext:value-type="float">
            <text:p>0,04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5959" calcext:value-type="float">
            <text:p>0,595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199" calcext:value-type="float">
            <text:p>0,019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08" calcext:value-type="float">
            <text:p>0,0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1945" calcext:value-type="float">
            <text:p>0,194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059" calcext:value-type="float">
            <text:p>0,005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04" calcext:value-type="float">
            <text:p>-0,0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008" calcext:value-type="float">
            <text:p>-0,00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04" calcext:value-type="float">
            <text:p>-0,0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032" calcext:value-type="float">
            <text:p>-0,00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529" calcext:value-type="float">
            <text:p>0,05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016" calcext:value-type="float">
            <text:p>-0,00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504" calcext:value-type="float">
            <text:p>0,05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683" calcext:value-type="float">
            <text:p>0,068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626" calcext:value-type="float">
            <text:p>0,062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3174" calcext:value-type="float">
            <text:p>0,317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72" calcext:value-type="float">
            <text:p>0,0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164" calcext:value-type="float">
            <text:p>0,016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1" calcext:value-type="float">
            <text:p>0,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607" calcext:value-type="float">
            <text:p>0,06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013" calcext:value-type="float">
            <text:p>0,00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1227" calcext:value-type="float">
            <text:p>0,12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2903" calcext:value-type="float">
            <text:p>0,29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152" calcext:value-type="float">
            <text:p>-0,01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799" calcext:value-type="float">
            <text:p>0,079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003" calcext:value-type="float">
            <text:p>0,00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009" calcext:value-type="float">
            <text:p>0,00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195" calcext:value-type="float">
            <text:p>0,19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65" calcext:value-type="float">
            <text:p>0,0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866" calcext:value-type="float">
            <text:p>0,08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001" calcext:value-type="float">
            <text:p>-0,00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1442" calcext:value-type="float">
            <text:p>0,144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1963" calcext:value-type="float">
            <text:p>0,196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001" calcext:value-type="float">
            <text:p>-0,00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1211" calcext:value-type="float">
            <text:p>0,12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2295" calcext:value-type="float">
            <text:p>0,229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2396" calcext:value-type="float">
            <text:p>0,239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5466" calcext:value-type="float">
            <text:p>0,54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529" calcext:value-type="float">
            <text:p>0,05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003" calcext:value-type="float">
            <text:p>-0,00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1108" calcext:value-type="float">
            <text:p>0,11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137" calcext:value-type="float">
            <text:p>0,01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-0.0029" calcext:value-type="float">
            <text:p>-0,00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-0.0008" calcext:value-type="float">
            <text:p>-0,00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299" calcext:value-type="float">
            <text:p>0,029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328" calcext:value-type="float">
            <text:p>0,032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565" calcext:value-type="float">
            <text:p>0,05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107" calcext:value-type="float">
            <text:p>0,01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502" calcext:value-type="float">
            <text:p>0,05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413" calcext:value-type="float">
            <text:p>0,04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169" calcext:value-type="float">
            <text:p>0,016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601" calcext:value-type="float">
            <text:p>0,06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448" calcext:value-type="float">
            <text:p>0,04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097" calcext:value-type="float">
            <text:p>0,00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001" calcext:value-type="float">
            <text:p>0,00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211" calcext:value-type="float">
            <text:p>0,02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-0.0007" calcext:value-type="float">
            <text:p>-0,00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984" calcext:value-type="float">
            <text:p>0,098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935" calcext:value-type="float">
            <text:p>0,09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1855" calcext:value-type="float">
            <text:p>0,18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2274" calcext:value-type="float">
            <text:p>0,227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852" calcext:value-type="float">
            <text:p>0,08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025" calcext:value-type="float">
            <text:p>0,002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2722" calcext:value-type="float">
            <text:p>0,272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645" calcext:value-type="float">
            <text:p>0,064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864" calcext:value-type="float">
            <text:p>0,086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723" calcext:value-type="float">
            <text:p>0,072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172" calcext:value-type="float">
            <text:p>0,01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1599" calcext:value-type="float">
            <text:p>0,159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-0.0028" calcext:value-type="float">
            <text:p>-0,002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1119" calcext:value-type="float">
            <text:p>0,11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2298" calcext:value-type="float">
            <text:p>0,229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2301" calcext:value-type="float">
            <text:p>0,23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5496" calcext:value-type="float">
            <text:p>0,549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832" calcext:value-type="float">
            <text:p>0,08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774" calcext:value-type="float">
            <text:p>0,077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163" calcext:value-type="float">
            <text:p>0,016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159" calcext:value-type="float">
            <text:p>0,015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-0.0013" calcext:value-type="float">
            <text:p>-0,00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53" calcext:value-type="float">
            <text:p>0,005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335" calcext:value-type="float">
            <text:p>0,03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361" calcext:value-type="float">
            <text:p>0,036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584" calcext:value-type="float">
            <text:p>0,058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12" calcext:value-type="float">
            <text:p>0,0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52" calcext:value-type="float">
            <text:p>0,00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-0.0567" calcext:value-type="float">
            <text:p>-0,056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584" calcext:value-type="float">
            <text:p>0,058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5616" calcext:value-type="float">
            <text:p>0,56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1263" calcext:value-type="float">
            <text:p>0,126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87" calcext:value-type="float">
            <text:p>0,00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72" calcext:value-type="float">
            <text:p>0,00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144" calcext:value-type="float">
            <text:p>0,01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96" calcext:value-type="float">
            <text:p>0,009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34" calcext:value-type="float">
            <text:p>0,003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1971" calcext:value-type="float">
            <text:p>0,197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895" calcext:value-type="float">
            <text:p>0,089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632" calcext:value-type="float">
            <text:p>0,06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997" calcext:value-type="float">
            <text:p>0,09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204" calcext:value-type="float">
            <text:p>0,02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182" calcext:value-type="float">
            <text:p>0,018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312" calcext:value-type="float">
            <text:p>0,3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14" calcext:value-type="float">
            <text:p>0,0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1696" calcext:value-type="float">
            <text:p>0,169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1045" calcext:value-type="float">
            <text:p>0,104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253" calcext:value-type="float">
            <text:p>0,025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1819" calcext:value-type="float">
            <text:p>0,18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59" calcext:value-type="float">
            <text:p>0,005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837" calcext:value-type="float">
            <text:p>0,08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809" calcext:value-type="float">
            <text:p>0,08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1062" calcext:value-type="float">
            <text:p>0,106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6297" calcext:value-type="float">
            <text:p>0,62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56" calcext:value-type="float">
            <text:p>0,0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445" calcext:value-type="float">
            <text:p>0,044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477" calcext:value-type="float">
            <text:p>0,047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056" calcext:value-type="float">
            <text:p>0,00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002" calcext:value-type="float">
            <text:p>-0,00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055" calcext:value-type="float">
            <text:p>0,00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206" calcext:value-type="float">
            <text:p>0,02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005" calcext:value-type="float">
            <text:p>-0,00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383" calcext:value-type="float">
            <text:p>0,038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121" calcext:value-type="float">
            <text:p>0,01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716" calcext:value-type="float">
            <text:p>-0,07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574" calcext:value-type="float">
            <text:p>-0,057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3851" calcext:value-type="float">
            <text:p>0,385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205" calcext:value-type="float">
            <text:p>-0,02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04" calcext:value-type="float">
            <text:p>0,0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063" calcext:value-type="float">
            <text:p>-0,006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025" calcext:value-type="float">
            <text:p>-0,002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07" calcext:value-type="float">
            <text:p>0,0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029" calcext:value-type="float">
            <text:p>0,00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2731" calcext:value-type="float">
            <text:p>0,27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1173" calcext:value-type="float">
            <text:p>0,117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1354" calcext:value-type="float">
            <text:p>0,135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86" calcext:value-type="float">
            <text:p>0,0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164" calcext:value-type="float">
            <text:p>0,016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76" calcext:value-type="float">
            <text:p>0,07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3029" calcext:value-type="float">
            <text:p>0,30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136" calcext:value-type="float">
            <text:p>0,013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549" calcext:value-type="float">
            <text:p>0,054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138" calcext:value-type="float">
            <text:p>0,1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281" calcext:value-type="float">
            <text:p>-0,02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1202" calcext:value-type="float">
            <text:p>0,12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172" calcext:value-type="float">
            <text:p>0,01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771" calcext:value-type="float">
            <text:p>-0,077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175" calcext:value-type="float">
            <text:p>0,17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1624" calcext:value-type="float">
            <text:p>0,16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5119" calcext:value-type="float">
            <text:p>0,51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233" calcext:value-type="float">
            <text:p>0,02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21" calcext:value-type="float">
            <text:p>0,0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113" calcext:value-type="float">
            <text:p>0,1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101" calcext:value-type="float">
            <text:p>0,01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094" calcext:value-type="float">
            <text:p>0,00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083" calcext:value-type="float">
            <text:p>0,008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693" calcext:value-type="float">
            <text:p>0,069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629" calcext:value-type="float">
            <text:p>0,06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999" calcext:value-type="float">
            <text:p>0,099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144" calcext:value-type="float">
            <text:p>0,01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21" calcext:value-type="float">
            <text:p>0,0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685" calcext:value-type="float">
            <text:p>0,068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903" calcext:value-type="float">
            <text:p>0,09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584" calcext:value-type="float">
            <text:p>0,58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471" calcext:value-type="float">
            <text:p>0,047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227" calcext:value-type="float">
            <text:p>0,02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361" calcext:value-type="float">
            <text:p>0,036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397" calcext:value-type="float">
            <text:p>0,03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236" calcext:value-type="float">
            <text:p>0,023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281" calcext:value-type="float">
            <text:p>0,02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1392" calcext:value-type="float">
            <text:p>0,139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311" calcext:value-type="float">
            <text:p>0,3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-0.0333" calcext:value-type="float">
            <text:p>-0,03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297" calcext:value-type="float">
            <text:p>0,02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098" calcext:value-type="float">
            <text:p>0,009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038" calcext:value-type="float">
            <text:p>0,00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2602" calcext:value-type="float">
            <text:p>0,26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13" calcext:value-type="float">
            <text:p>0,0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535" calcext:value-type="float">
            <text:p>0,05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-0.0001" calcext:value-type="float">
            <text:p>-0,00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2573" calcext:value-type="float">
            <text:p>0,257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308" calcext:value-type="float">
            <text:p>0,03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3711" calcext:value-type="float">
            <text:p>0,37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2799" calcext:value-type="float">
            <text:p>0,279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-0.0535" calcext:value-type="float">
            <text:p>-0,05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-0.0652" calcext:value-type="float">
            <text:p>-0,06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3914" calcext:value-type="float">
            <text:p>0,39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166" calcext:value-type="float">
            <text:p>0,1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603" calcext:value-type="float">
            <text:p>0,06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532" calcext:value-type="float">
            <text:p>0,05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071" calcext:value-type="float">
            <text:p>0,007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0014" calcext:value-type="float">
            <text:p>-0,00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0009" calcext:value-type="float">
            <text:p>-0,00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0044" calcext:value-type="float">
            <text:p>-0,00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0027" calcext:value-type="float">
            <text:p>-0,00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0135" calcext:value-type="float">
            <text:p>-0,01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0016" calcext:value-type="float">
            <text:p>-0,00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856" calcext:value-type="float">
            <text:p>0,08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1111" calcext:value-type="float">
            <text:p>0,11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1047" calcext:value-type="float">
            <text:p>0,104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5431" calcext:value-type="float">
            <text:p>0,54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1033" calcext:value-type="float">
            <text:p>0,10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285" calcext:value-type="float">
            <text:p>0,028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105" calcext:value-type="float">
            <text:p>0,01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75" calcext:value-type="float">
            <text:p>0,07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713" calcext:value-type="float">
            <text:p>0,07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3389" calcext:value-type="float">
            <text:p>0,338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1539" calcext:value-type="float">
            <text:p>0,15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3504" calcext:value-type="float">
            <text:p>0,35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0315" calcext:value-type="float">
            <text:p>-0,03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768" calcext:value-type="float">
            <text:p>0,076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103" calcext:value-type="float">
            <text:p>0,01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172" calcext:value-type="float">
            <text:p>0,01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4332" calcext:value-type="float">
            <text:p>0,43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5046" calcext:value-type="float">
            <text:p>0,504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1101" calcext:value-type="float">
            <text:p>0,11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002" calcext:value-type="float">
            <text:p>0,00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0012" calcext:value-type="float">
            <text:p>-0,00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632" calcext:value-type="float">
            <text:p>0,06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428" calcext:value-type="float">
            <text:p>0,042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3096" calcext:value-type="float">
            <text:p>0,309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1625" calcext:value-type="float">
            <text:p>-0,162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1988" calcext:value-type="float">
            <text:p>-0,19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1986" calcext:value-type="float">
            <text:p>0,19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1041" calcext:value-type="float">
            <text:p>0,10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1839" calcext:value-type="float">
            <text:p>0,18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113" calcext:value-type="float">
            <text:p>0,01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303" calcext:value-type="float">
            <text:p>0,03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12" calcext:value-type="float">
            <text:p>0,0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-0.0027" calcext:value-type="float">
            <text:p>-0,00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006" calcext:value-type="float">
            <text:p>0,00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184" calcext:value-type="float">
            <text:p>0,018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169" calcext:value-type="float">
            <text:p>0,016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171" calcext:value-type="float">
            <text:p>0,017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027" calcext:value-type="float">
            <text:p>0,00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002" calcext:value-type="float">
            <text:p>0,10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181" calcext:value-type="float">
            <text:p>0,11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5973" calcext:value-type="float">
            <text:p>0,597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698" calcext:value-type="float">
            <text:p>0,069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31" calcext:value-type="float">
            <text:p>0,0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225" calcext:value-type="float">
            <text:p>0,022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638" calcext:value-type="float">
            <text:p>0,06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427" calcext:value-type="float">
            <text:p>0,04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706" calcext:value-type="float">
            <text:p>0,07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744" calcext:value-type="float">
            <text:p>0,07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96" calcext:value-type="float">
            <text:p>0,19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293" calcext:value-type="float">
            <text:p>0,029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394" calcext:value-type="float">
            <text:p>0,03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07" calcext:value-type="float">
            <text:p>0,0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884" calcext:value-type="float">
            <text:p>0,088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5302" calcext:value-type="float">
            <text:p>0,53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554" calcext:value-type="float">
            <text:p>0,155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073" calcext:value-type="float">
            <text:p>0,007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602" calcext:value-type="float">
            <text:p>0,06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053" calcext:value-type="float">
            <text:p>0,105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654" calcext:value-type="float">
            <text:p>0,065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2498" calcext:value-type="float">
            <text:p>0,249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2486" calcext:value-type="float">
            <text:p>0,24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509" calcext:value-type="float">
            <text:p>0,15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726" calcext:value-type="float">
            <text:p>0,172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4408" calcext:value-type="float">
            <text:p>0,44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829" calcext:value-type="float">
            <text:p>0,18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727" calcext:value-type="float">
            <text:p>0,07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037" calcext:value-type="float">
            <text:p>0,10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269" calcext:value-type="float">
            <text:p>0,026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097" calcext:value-type="float">
            <text:p>0,00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064" calcext:value-type="float">
            <text:p>0,006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221" calcext:value-type="float">
            <text:p>0,02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632" calcext:value-type="float">
            <text:p>0,06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1014" calcext:value-type="float">
            <text:p>0,10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394" calcext:value-type="float">
            <text:p>0,03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008" calcext:value-type="float">
            <text:p>0,00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-0.032" calcext:value-type="float">
            <text:p>-0,0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-0.0514" calcext:value-type="float">
            <text:p>-0,05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5109" calcext:value-type="float">
            <text:p>0,51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466" calcext:value-type="float">
            <text:p>0,04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2533" calcext:value-type="float">
            <text:p>0,25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1967" calcext:value-type="float">
            <text:p>0,196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2893" calcext:value-type="float">
            <text:p>0,289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135" calcext:value-type="float">
            <text:p>0,01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497" calcext:value-type="float">
            <text:p>0,04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1747" calcext:value-type="float">
            <text:p>0,174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324" calcext:value-type="float">
            <text:p>0,3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-0.0559" calcext:value-type="float">
            <text:p>-0,055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1908" calcext:value-type="float">
            <text:p>0,19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114" calcext:value-type="float">
            <text:p>0,01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52" calcext:value-type="float">
            <text:p>0,0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5127" calcext:value-type="float">
            <text:p>0,51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-0.0032" calcext:value-type="float">
            <text:p>-0,00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1036" calcext:value-type="float">
            <text:p>0,103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2035" calcext:value-type="float">
            <text:p>0,20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176" calcext:value-type="float">
            <text:p>0,17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405" calcext:value-type="float">
            <text:p>0,04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1877" calcext:value-type="float">
            <text:p>0,187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3999" calcext:value-type="float">
            <text:p>0,399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-0.0305" calcext:value-type="float">
            <text:p>-0,03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986" calcext:value-type="float">
            <text:p>0,09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1999" calcext:value-type="float">
            <text:p>0,199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2094" calcext:value-type="float">
            <text:p>0,20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597" calcext:value-type="float">
            <text:p>0,05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226" calcext:value-type="float">
            <text:p>0,22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117" calcext:value-type="float">
            <text:p>0,011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041" calcext:value-type="float">
            <text:p>0,00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-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039" calcext:value-type="float">
            <text:p>0,00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257" calcext:value-type="float">
            <text:p>0,025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403" calcext:value-type="float">
            <text:p>0,04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338" calcext:value-type="float">
            <text:p>0,03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106" calcext:value-type="float">
            <text:p>0,01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-0.0463" calcext:value-type="float">
            <text:p>-0,046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-0.0706" calcext:value-type="float">
            <text:p>-0,07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4604" calcext:value-type="float">
            <text:p>0,46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397" calcext:value-type="float">
            <text:p>0,03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565" calcext:value-type="float">
            <text:p>0,05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269" calcext:value-type="float">
            <text:p>0,026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776" calcext:value-type="float">
            <text:p>0,077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445" calcext:value-type="float">
            <text:p>0,044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2311" calcext:value-type="float">
            <text:p>0,23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1832" calcext:value-type="float">
            <text:p>0,18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3352" calcext:value-type="float">
            <text:p>0,33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-0.0552" calcext:value-type="float">
            <text:p>-0,05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2099" calcext:value-type="float">
            <text:p>0,209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093" calcext:value-type="float">
            <text:p>0,009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044" calcext:value-type="float">
            <text:p>0,00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4926" calcext:value-type="float">
            <text:p>0,492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041" calcext:value-type="float">
            <text:p>0,00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1098" calcext:value-type="float">
            <text:p>0,109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841" calcext:value-type="float">
            <text:p>0,08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1911" calcext:value-type="float">
            <text:p>0,19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642" calcext:value-type="float">
            <text:p>0,064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1813" calcext:value-type="float">
            <text:p>0,18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5827" calcext:value-type="float">
            <text:p>0,58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401" calcext:value-type="float">
            <text:p>0,04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255" calcext:value-type="float">
            <text:p>0,2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3432" calcext:value-type="float">
            <text:p>0,34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1738" calcext:value-type="float">
            <text:p>0,17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838" calcext:value-type="float">
            <text:p>0,08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2341" calcext:value-type="float">
            <text:p>0,23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165" calcext:value-type="float">
            <text:p>0,01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088" calcext:value-type="float">
            <text:p>0,00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05" calcext:value-type="float">
            <text:p>0,0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303" calcext:value-type="float">
            <text:p>0,03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355" calcext:value-type="float">
            <text:p>0,03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564" calcext:value-type="float">
            <text:p>0,056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128" calcext:value-type="float">
            <text:p>0,012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045" calcext:value-type="float">
            <text:p>-0,004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1091" calcext:value-type="float">
            <text:p>0,109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983" calcext:value-type="float">
            <text:p>0,098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6022" calcext:value-type="float">
            <text:p>0,602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247" calcext:value-type="float">
            <text:p>0,024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074" calcext:value-type="float">
            <text:p>-0,007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024" calcext:value-type="float">
            <text:p>-0,00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101" calcext:value-type="float">
            <text:p>-0,01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019" calcext:value-type="float">
            <text:p>0,00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286" calcext:value-type="float">
            <text:p>-0,02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2755" calcext:value-type="float">
            <text:p>-0,27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1168" calcext:value-type="float">
            <text:p>-0,116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1768" calcext:value-type="float">
            <text:p>-0,176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778" calcext:value-type="float">
            <text:p>-0,077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2942" calcext:value-type="float">
            <text:p>0,294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938" calcext:value-type="float">
            <text:p>-0,09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2095" calcext:value-type="float">
            <text:p>0,209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066" calcext:value-type="float">
            <text:p>0,00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466" calcext:value-type="float">
            <text:p>-0,04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583" calcext:value-type="float">
            <text:p>0,058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1321" calcext:value-type="float">
            <text:p>-0,13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645" calcext:value-type="float">
            <text:p>-0,064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1582" calcext:value-type="float">
            <text:p>0,158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1033" calcext:value-type="float">
            <text:p>0,10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1228" calcext:value-type="float">
            <text:p>-0,122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4422" calcext:value-type="float">
            <text:p>0,442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13" calcext:value-type="float">
            <text:p>-0,0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237" calcext:value-type="float">
            <text:p>0,02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647" calcext:value-type="float">
            <text:p>-0,064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1448" calcext:value-type="float">
            <text:p>-0,14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17" calcext:value-type="float">
            <text:p>-0,001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04" calcext:value-type="float">
            <text:p>-0,00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168" calcext:value-type="float">
            <text:p>-0,016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108" calcext:value-type="float">
            <text:p>-0,01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442" calcext:value-type="float">
            <text:p>-0,044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06" calcext:value-type="float">
            <text:p>-0,00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31" calcext:value-type="float">
            <text:p>-0,00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375" calcext:value-type="float">
            <text:p>-0,037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2749" calcext:value-type="float">
            <text:p>-0,274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5" calcext:value-type="float">
            <text:p>-0,0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01" calcext:value-type="float">
            <text:p>-0,00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3" calcext:value-type="float">
            <text:p>-0,0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0.0018" calcext:value-type="float">
            <text:p>0,00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45" calcext:value-type="float">
            <text:p>-0,04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632" calcext:value-type="float">
            <text:p>-0,06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356" calcext:value-type="float">
            <text:p>-0,03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0.0096" calcext:value-type="float">
            <text:p>0,009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01" calcext:value-type="float">
            <text:p>-0,00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429" calcext:value-type="float">
            <text:p>-0,04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182" calcext:value-type="float">
            <text:p>-0,018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01" calcext:value-type="float">
            <text:p>-0,00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0.0197" calcext:value-type="float">
            <text:p>0,01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0.0144" calcext:value-type="float">
            <text:p>0,01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244" calcext:value-type="float">
            <text:p>-0,02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126" calcext:value-type="float">
            <text:p>-0,012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137" calcext:value-type="float">
            <text:p>-0,01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207" calcext:value-type="float">
            <text:p>-0,02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831" calcext:value-type="float">
            <text:p>-0,08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0.4524" calcext:value-type="float">
            <text:p>0,45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0.2509" calcext:value-type="float">
            <text:p>0,25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0.0004" calcext:value-type="float">
            <text:p>0,00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03" calcext:value-type="float">
            <text:p>-0,00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607" calcext:value-type="float">
            <text:p>-0,06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84" calcext:value-type="float">
            <text:p>0,018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057" calcext:value-type="float">
            <text:p>0,005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054" calcext:value-type="float">
            <text:p>0,005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337" calcext:value-type="float">
            <text:p>0,03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348" calcext:value-type="float">
            <text:p>0,03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587" calcext:value-type="float">
            <text:p>0,05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21" calcext:value-type="float">
            <text:p>0,01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003" calcext:value-type="float">
            <text:p>0,00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-0.0924" calcext:value-type="float">
            <text:p>-0,09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64" calcext:value-type="float">
            <text:p>0,016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3179" calcext:value-type="float">
            <text:p>0,317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1007" calcext:value-type="float">
            <text:p>0,10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" calcext:value-type="float">
            <text:p>0,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03" calcext:value-type="float">
            <text:p>0,0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86" calcext:value-type="float">
            <text:p>0,01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03" calcext:value-type="float">
            <text:p>0,0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066" calcext:value-type="float">
            <text:p>0,00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783" calcext:value-type="float">
            <text:p>0,078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356" calcext:value-type="float">
            <text:p>0,03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606" calcext:value-type="float">
            <text:p>0,06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29" calcext:value-type="float">
            <text:p>0,01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97" calcext:value-type="float">
            <text:p>0,01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74" calcext:value-type="float">
            <text:p>0,017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546" calcext:value-type="float">
            <text:p>0,054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36" calcext:value-type="float">
            <text:p>0,013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284" calcext:value-type="float">
            <text:p>0,028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253" calcext:value-type="float">
            <text:p>0,025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27" calcext:value-type="float">
            <text:p>0,01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26" calcext:value-type="float">
            <text:p>0,02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538" calcext:value-type="float">
            <text:p>0,05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337" calcext:value-type="float">
            <text:p>0,03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509" calcext:value-type="float">
            <text:p>0,05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2684" calcext:value-type="float">
            <text:p>0,268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2988" calcext:value-type="float">
            <text:p>0,29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632" calcext:value-type="float">
            <text:p>0,06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095" calcext:value-type="float">
            <text:p>0,009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321" calcext:value-type="float">
            <text:p>0,03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188" calcext:value-type="float">
            <text:p>0,01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001" calcext:value-type="float">
            <text:p>0,00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015" calcext:value-type="float">
            <text:p>0,00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416" calcext:value-type="float">
            <text:p>0,04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535" calcext:value-type="float">
            <text:p>0,05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1059" calcext:value-type="float">
            <text:p>0,105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205" calcext:value-type="float">
            <text:p>0,02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484" calcext:value-type="float">
            <text:p>0,048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1023" calcext:value-type="float">
            <text:p>0,102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1063" calcext:value-type="float">
            <text:p>0,106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5587" calcext:value-type="float">
            <text:p>0,55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972" calcext:value-type="float">
            <text:p>0,09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294" calcext:value-type="float">
            <text:p>0,02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301" calcext:value-type="float">
            <text:p>0,03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476" calcext:value-type="float">
            <text:p>0,047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256" calcext:value-type="float">
            <text:p>0,02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561" calcext:value-type="float">
            <text:p>0,056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1567" calcext:value-type="float">
            <text:p>0,156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288" calcext:value-type="float">
            <text:p>0,2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-0.0562" calcext:value-type="float">
            <text:p>-0,056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148" calcext:value-type="float">
            <text:p>0,1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-0.0203" calcext:value-type="float">
            <text:p>-0,02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23" calcext:value-type="float">
            <text:p>0,02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5159" calcext:value-type="float">
            <text:p>0,515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1406" calcext:value-type="float">
            <text:p>0,14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303" calcext:value-type="float">
            <text:p>0,03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055" calcext:value-type="float">
            <text:p>0,00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1339" calcext:value-type="float">
            <text:p>0,13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4647" calcext:value-type="float">
            <text:p>0,464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986" calcext:value-type="float">
            <text:p>0,09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4571" calcext:value-type="float">
            <text:p>0,457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2145" calcext:value-type="float">
            <text:p>0,214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-0.0316" calcext:value-type="float">
            <text:p>-0,03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-0.0239" calcext:value-type="float">
            <text:p>-0,02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124" calcext:value-type="float">
            <text:p>0,01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1394" calcext:value-type="float">
            <text:p>0,13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-0.0027" calcext:value-type="float">
            <text:p>-0,00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AirCarbon2_t_8.jpg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008" calcext:value-type="float">
            <text:p>-0,0008</text:p>
          </table:table-cell>
          <table:table-cell table:number-columns-repeated="15"/>
          <table:table-cell office:value-type="float" office:value="-0.0008" calcext:value-type="float">
            <text:p>-0,0008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AirCarbon3_80.jpg_bright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012" calcext:value-type="float">
            <text:p>-0,0012</text:p>
          </table:table-cell>
          <table:table-cell table:number-columns-repeated="15"/>
          <table:table-cell office:value-type="float" office:value="-0.0012" calcext:value-type="float">
            <text:p>-0,0012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AirCarbon3_80.jpg_dark_1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009" calcext:value-type="float">
            <text:p>-0,0009</text:p>
          </table:table-cell>
          <table:table-cell table:number-columns-repeated="15"/>
          <table:table-cell office:value-type="float" office:value="-0.0009" calcext:value-type="float">
            <text:p>-0,0009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AirCarbon3_80.jpg_dark_2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042" calcext:value-type="float">
            <text:p>-0,0042</text:p>
          </table:table-cell>
          <table:table-cell table:number-columns-repeated="15"/>
          <table:table-cell office:value-type="float" office:value="-0.0042" calcext:value-type="float">
            <text:p>-0,0042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AirCarbon3_80.jpg_dark_3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024" calcext:value-type="float">
            <text:p>-0,0024</text:p>
          </table:table-cell>
          <table:table-cell table:number-columns-repeated="15"/>
          <table:table-cell office:value-type="float" office:value="-0.0024" calcext:value-type="float">
            <text:p>-0,0024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AirCarbon3_80.jpg_dark_4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121" calcext:value-type="float">
            <text:p>-0,0121</text:p>
          </table:table-cell>
          <table:table-cell table:number-columns-repeated="15"/>
          <table:table-cell office:value-type="float" office:value="-0.0121" calcext:value-type="float">
            <text:p>-0,0121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AirCarbon3_80.jpg_dark_5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015" calcext:value-type="float">
            <text:p>-0,0015</text:p>
          </table:table-cell>
          <table:table-cell table:number-columns-repeated="15"/>
          <table:table-cell office:value-type="float" office:value="-0.0015" calcext:value-type="float">
            <text:p>-0,0015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KollektorSSD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0934" calcext:value-type="float">
            <text:p>0,0934</text:p>
          </table:table-cell>
          <table:table-cell table:number-columns-repeated="15"/>
          <table:table-cell office:value-type="float" office:value="0.0934" calcext:value-type="float">
            <text:p>0,0934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AIPreform2_Spule0_0315_Upside_Thread_256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21" calcext:value-type="float">
            <text:p>-0,021</text:p>
          </table:table-cell>
          <table:table-cell table:number-columns-repeated="15"/>
          <table:table-cell office:value-type="float" office:value="-0.021" calcext:value-type="float">
            <text:p>-0,021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AIPreform2_Spule0_0315_Upside_Thread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082" calcext:value-type="float">
            <text:p>-0,0082</text:p>
          </table:table-cell>
          <table:table-cell table:number-columns-repeated="15"/>
          <table:table-cell office:value-type="float" office:value="-0.0082" calcext:value-type="float">
            <text:p>-0,0082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AIPreform2_Spule0_0315_Upside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873" calcext:value-type="float">
            <text:p>-0,0873</text:p>
          </table:table-cell>
          <table:table-cell table:number-columns-repeated="15"/>
          <table:table-cell office:value-type="float" office:value="-0.0873" calcext:value-type="float">
            <text:p>-0,0873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AIPreform2_Spule0_0816_Upside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0541" calcext:value-type="float">
            <text:p>0,0541</text:p>
          </table:table-cell>
          <table:table-cell table:number-columns-repeated="15"/>
          <table:table-cell office:value-type="float" office:value="0.0541" calcext:value-type="float">
            <text:p>0,0541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CF_ReferenceSet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046" calcext:value-type="float">
            <text:p>-0,0046</text:p>
          </table:table-cell>
          <table:table-cell table:number-columns-repeated="15"/>
          <table:table-cell office:value-type="float" office:value="-0.0046" calcext:value-type="float">
            <text:p>-0,0046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CF_ReferenceSet_Small_Dark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059" calcext:value-type="float">
            <text:p>-0,0059</text:p>
          </table:table-cell>
          <table:table-cell table:number-columns-repeated="15"/>
          <table:table-cell office:value-type="float" office:value="-0.0059" calcext:value-type="float">
            <text:p>-0,0059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CF_ReferenceSet_Small_Light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1" calcext:value-type="float">
            <text:p>-0,01</text:p>
          </table:table-cell>
          <table:table-cell table:number-columns-repeated="15"/>
          <table:table-cell office:value-type="float" office:value="-0.01" calcext:value-type="float">
            <text:p>-0,01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FabricDefectsAITEX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0008" calcext:value-type="float">
            <text:p>0,0008</text:p>
          </table:table-cell>
          <table:table-cell table:number-columns-repeated="15"/>
          <table:table-cell office:value-type="float" office:value="0.0008" calcext:value-type="float">
            <text:p>0,0008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T_Blowhole_train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3838" calcext:value-type="float">
            <text:p>0,3838</text:p>
          </table:table-cell>
          <table:table-cell table:number-columns-repeated="15"/>
          <table:table-cell office:value-type="float" office:value="0.3838" calcext:value-type="float">
            <text:p>0,3838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VTec_AD_Bottle_Broken_Lg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0181" calcext:value-type="float">
            <text:p>0,0181</text:p>
          </table:table-cell>
          <table:table-cell table:number-columns-repeated="15"/>
          <table:table-cell office:value-type="float" office:value="0.0181" calcext:value-type="float">
            <text:p>0,0181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VTec_AD_Bottle_Broken_Sm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035" calcext:value-type="float">
            <text:p>0,035</text:p>
          </table:table-cell>
          <table:table-cell table:number-columns-repeated="15"/>
          <table:table-cell office:value-type="float" office:value="0.035" calcext:value-type="float">
            <text:p>0,035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VTec_AD_Cable_Missing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067" calcext:value-type="float">
            <text:p>0,067</text:p>
          </table:table-cell>
          <table:table-cell table:number-columns-repeated="15"/>
          <table:table-cell office:value-type="float" office:value="0.067" calcext:value-type="float">
            <text:p>0,067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VTec_AD_Capsule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0191" calcext:value-type="float">
            <text:p>0,0191</text:p>
          </table:table-cell>
          <table:table-cell table:number-columns-repeated="15"/>
          <table:table-cell office:value-type="float" office:value="0.0191" calcext:value-type="float">
            <text:p>0,0191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VTec_AD_Carpet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365" calcext:value-type="float">
            <text:p>-0,0365</text:p>
          </table:table-cell>
          <table:table-cell table:number-columns-repeated="15"/>
          <table:table-cell office:value-type="float" office:value="-0.0365" calcext:value-type="float">
            <text:p>-0,0365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VTec_AD_Grid_Thread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066" calcext:value-type="float">
            <text:p>-0,0066</text:p>
          </table:table-cell>
          <table:table-cell table:number-columns-repeated="15"/>
          <table:table-cell office:value-type="float" office:value="-0.0066" calcext:value-type="float">
            <text:p>-0,0066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VTec_AD_Hazelnut_Crack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2074" calcext:value-type="float">
            <text:p>0,2074</text:p>
          </table:table-cell>
          <table:table-cell table:number-columns-repeated="15"/>
          <table:table-cell office:value-type="float" office:value="0.2074" calcext:value-type="float">
            <text:p>0,2074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VTec_AD_Leather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1897" calcext:value-type="float">
            <text:p>0,1897</text:p>
          </table:table-cell>
          <table:table-cell table:number-columns-repeated="15"/>
          <table:table-cell office:value-type="float" office:value="0.1897" calcext:value-type="float">
            <text:p>0,1897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VTec_AD_Metal_Nut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0528" calcext:value-type="float">
            <text:p>0,0528</text:p>
          </table:table-cell>
          <table:table-cell table:number-columns-repeated="15"/>
          <table:table-cell office:value-type="float" office:value="0.0528" calcext:value-type="float">
            <text:p>0,0528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VTec_AD_Pill_Crack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011" calcext:value-type="float">
            <text:p>-0,0011</text:p>
          </table:table-cell>
          <table:table-cell table:number-columns-repeated="15"/>
          <table:table-cell office:value-type="float" office:value="-0.0011" calcext:value-type="float">
            <text:p>-0,0011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VTec_AD_Screw_Scratch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018" calcext:value-type="float">
            <text:p>-0,0018</text:p>
          </table:table-cell>
          <table:table-cell table:number-columns-repeated="15"/>
          <table:table-cell office:value-type="float" office:value="-0.0018" calcext:value-type="float">
            <text:p>-0,0018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VTec_AD_Tile_Crack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5194" calcext:value-type="float">
            <text:p>0,5194</text:p>
          </table:table-cell>
          <table:table-cell table:number-columns-repeated="15"/>
          <table:table-cell office:value-type="float" office:value="0.5194" calcext:value-type="float">
            <text:p>0,5194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VTec_AD_Toothbrush_Sm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004" calcext:value-type="float">
            <text:p>0,004</text:p>
          </table:table-cell>
          <table:table-cell table:number-columns-repeated="15"/>
          <table:table-cell office:value-type="float" office:value="0.004" calcext:value-type="float">
            <text:p>0,004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VTec_AD_Wood_Scratch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0091" calcext:value-type="float">
            <text:p>0,0091</text:p>
          </table:table-cell>
          <table:table-cell table:number-columns-repeated="15"/>
          <table:table-cell office:value-type="float" office:value="0.0091" calcext:value-type="float">
            <text:p>0,0091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VTec_AD_Zipper_Rough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0369" calcext:value-type="float">
            <text:p>0,0369</text:p>
          </table:table-cell>
          <table:table-cell table:number-columns-repeated="15"/>
          <table:table-cell office:value-type="float" office:value="0.0369" calcext:value-type="float">
            <text:p>0,0369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Pultrusion_Resin_Augmtd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229" calcext:value-type="float">
            <text:p>-0,0229</text:p>
          </table:table-cell>
          <table:table-cell table:number-columns-repeated="15"/>
          <table:table-cell office:value-type="float" office:value="-0.0229" calcext:value-type="float">
            <text:p>-0,0229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Pultrusion_Resin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0025" calcext:value-type="float">
            <text:p>0,0025</text:p>
          </table:table-cell>
          <table:table-cell table:number-columns-repeated="15"/>
          <table:table-cell office:value-type="float" office:value="0.0025" calcext:value-type="float">
            <text:p>0,0025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Pultrusion_Window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445" calcext:value-type="float">
            <text:p>-0,0445</text:p>
          </table:table-cell>
          <table:table-cell table:number-columns-repeated="15"/>
          <table:table-cell office:value-type="float" office:value="-0.0445" calcext:value-type="float">
            <text:p>-0,0445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severstal-steel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0321" calcext:value-type="float">
            <text:p>0,0321</text:p>
          </table:table-cell>
          <table:table-cell table:number-columns-repeated="15"/>
          <table:table-cell office:value-type="float" office:value="0.0321" calcext:value-type="float">
            <text:p>0,0321</text:p>
          </table:table-cell>
        </table:table-row>
        <table:table-row table:style-name="ro2">
          <table:table-cell office:value-type="string" calcext:value-type="string">
            <text:p>CrackForest_best_pipeline</text:p>
          </table:table-cell>
          <table:table-cell office:value-type="string" calcext:value-type="string">
            <text:p>MVTec_AD_Transistor_best_pipeline</text:p>
          </table:table-cell>
          <table:table-cell office:value-type="float" office:value="0.4062" calcext:value-type="float">
            <text:p>0,4062</text:p>
          </table:table-cell>
          <table:table-cell office:value-type="float" office:value="-0.0167" calcext:value-type="float">
            <text:p>-0,0167</text:p>
          </table:table-cell>
          <table:table-cell table:number-columns-repeated="15"/>
          <table:table-cell office:value-type="float" office:value="-0.0167" calcext:value-type="float">
            <text:p>-0,0167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105" calcext:value-type="float">
            <text:p>0,01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55" calcext:value-type="float">
            <text:p>0,00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34" calcext:value-type="float">
            <text:p>0,003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2" calcext:value-type="float">
            <text:p>0,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248" calcext:value-type="float">
            <text:p>0,02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391" calcext:value-type="float">
            <text:p>0,039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82" calcext:value-type="float">
            <text:p>0,008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-0.0004" calcext:value-type="float">
            <text:p>-0,00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462" calcext:value-type="float">
            <text:p>0,046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506" calcext:value-type="float">
            <text:p>0,05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2706" calcext:value-type="float">
            <text:p>0,27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594" calcext:value-type="float">
            <text:p>0,05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83" calcext:value-type="float">
            <text:p>0,008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1" calcext:value-type="float">
            <text:p>0,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99" calcext:value-type="float">
            <text:p>0,009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-0.0032" calcext:value-type="float">
            <text:p>-0,00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4" calcext:value-type="float">
            <text:p>0,0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72" calcext:value-type="float">
            <text:p>0,0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723" calcext:value-type="float">
            <text:p>0,072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-0.0881" calcext:value-type="float">
            <text:p>-0,08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229" calcext:value-type="float">
            <text:p>0,02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51" calcext:value-type="float">
            <text:p>0,005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27" calcext:value-type="float">
            <text:p>0,0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156" calcext:value-type="float">
            <text:p>0,1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-0.0057" calcext:value-type="float">
            <text:p>-0,005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347" calcext:value-type="float">
            <text:p>0,034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1011" calcext:value-type="float">
            <text:p>0,10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1055" calcext:value-type="float">
            <text:p>0,10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-0.0179" calcext:value-type="float">
            <text:p>-0,017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948" calcext:value-type="float">
            <text:p>0,09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35" calcext:value-type="float">
            <text:p>0,00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212" calcext:value-type="float">
            <text:p>0,02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15" calcext:value-type="float">
            <text:p>0,00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14" calcext:value-type="float">
            <text:p>0,00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1802" calcext:value-type="float">
            <text:p>0,18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253" calcext:value-type="float">
            <text:p>0,025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73" calcext:value-type="float">
            <text:p>0,0073</text:p>
          </table:table-cell>
          <table:table-cell table:number-columns-repeated="16"/>
        </table:table-row>
      </table:table>
      <table:table table:name="Mean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4" office:value-type="string" calcext:value-type="string">
            <text:p>Mean MCC Pipeline Cross Application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<text:s/>from </text:p>
          </table:table-cell>
          <table:table-cell table:style-name="ce5" office:value-type="string" calcext:value-type="string">
            <text:p><text:s/>applied on </text:p>
          </table:table-cell>
          <table:table-cell table:style-name="ce5" office:value-type="string" calcext:value-type="string">
            <text:p><text:s/>original_score </text:p>
          </table:table-cell>
          <table:table-cell table:style-name="ce5" office:value-type="string" calcext:value-type="string">
            <text:p><text:s/>cross_score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016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193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244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257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2234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83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14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22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36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974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040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666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373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537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466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24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74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Bottle_Broken_Sm_mean_pipeline </text:p>
          </table:table-cell>
          <table:table-cell table:number-columns-repeated="2" office:value-type="string" calcext:value-type="string">
            <text:p><text:s/>0.0336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187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782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090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032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418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2200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79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017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358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252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477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067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002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497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649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444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951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001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78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044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005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237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705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953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635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110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-0.0301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-0.0147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1228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083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964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509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1122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038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997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746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1605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-0.0280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1045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064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-0.0058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2223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013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289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115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2017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336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534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3282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1058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183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1600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728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559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454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1080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74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106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240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154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2089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64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29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469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369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795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15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501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003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725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51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41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257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432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241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64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134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113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2328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502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64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019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933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598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629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473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12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752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761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309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850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12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77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318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088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076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668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1111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131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726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454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410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3864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076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232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744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211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320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848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1724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301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3238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229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300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1095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2323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1170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383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856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118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2371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1749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059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645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2148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2148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171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324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2470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1296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120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083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440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1379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2214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330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177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162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161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1579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123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229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385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324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049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798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361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637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-0.0123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507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025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-0.0089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1969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244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174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420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496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1450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560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1330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803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-0.0178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-0.0167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597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1073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1727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013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000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088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456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848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1185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245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648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236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181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1711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184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291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256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572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018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110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2630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894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1357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625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638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1010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1665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341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290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313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716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825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1260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093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1146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1861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1745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555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264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1348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1283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268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289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016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184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619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660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151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-0.0123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-0.0060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1127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035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1772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1487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1934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092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871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404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787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-0.0149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636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-0.0031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-0.0073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1698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436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177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362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479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705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515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1733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862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-0.0116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163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125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794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1257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202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19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26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12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32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25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22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43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219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1007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85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46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599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18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33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722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1094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2038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189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12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11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2337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22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6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394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51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259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08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165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88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5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304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356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567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129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1303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6274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1239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67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2142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2142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5118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566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182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88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5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304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356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567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129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1345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6307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902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21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119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26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107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569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-0.8462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65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237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884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1064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-0.0272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2061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-0.0202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2114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2107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4344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605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-0.0172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175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88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5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304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356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567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129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1276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124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921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16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9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21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-0.9122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11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27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-0.0121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-0.0058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147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1079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-0.1606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2038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215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2153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4682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594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198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128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52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347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361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588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124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-0.0034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957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3765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-0.001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41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3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2895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1409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1866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-0.0022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497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362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6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81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-0.0164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212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95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59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57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5121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173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-0.0129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1645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016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001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002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304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814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1376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224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241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239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1133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029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207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1997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1880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160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485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829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121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137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129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001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151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1393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008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029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471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015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266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293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235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254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260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463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347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009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244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112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007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172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225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409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240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035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-0.0093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-0.0062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1081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147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709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679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031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202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430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859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-0.0205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318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018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-0.0008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1449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043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211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278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963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039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516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951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452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133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880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772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288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372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720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002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005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002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168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861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1587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415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001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218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128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1198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033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961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405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177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008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439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1057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160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636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027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022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532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1468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044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000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192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346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505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829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536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199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112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157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684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014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010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258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088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050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334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356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567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129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009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1253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530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4073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017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218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336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599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635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2683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925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157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258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084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985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2399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1347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314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657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738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490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1789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1135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1215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2601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2521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1153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717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1113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1350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001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013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010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039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009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133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014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997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338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092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353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913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100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138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145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013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158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508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996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187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238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059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2468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3264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873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170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002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5791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251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165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822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514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507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484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664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3581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18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146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56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35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339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588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123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101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101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28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54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1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4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38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-0.002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196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2351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298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348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-0.0105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1149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-0.0085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193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991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545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493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5458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-0.0119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-0.007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1825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19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098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301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1168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578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948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148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134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1299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6261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601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203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396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357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197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327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150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-0.033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729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143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4192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563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612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058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769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587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672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5134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871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-0.0382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-0.107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3045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1695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34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-0.0029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170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088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050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303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354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560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129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0009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1167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1150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6231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493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0114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0040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0224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135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0023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2724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1177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0323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234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3561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3019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229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687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591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1427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0023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1913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1474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1227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2776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2772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3094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571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0137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1792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133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063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080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351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324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552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098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008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397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412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2434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438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120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211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136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-0.0026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103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446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778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-0.0347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046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283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1879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-0.0046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260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1104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1168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028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812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195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127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-0.0128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-0.0171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1648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362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357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757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08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-0.0003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417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31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658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16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143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133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201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151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333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151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613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32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28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424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872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-0.011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282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382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-0.0005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32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218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272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-0.0154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-0.0134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164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781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146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22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33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53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85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028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471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102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054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082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276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11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7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18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042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2826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516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168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325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146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1064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199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1164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30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032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41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699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734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563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617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5425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058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084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1786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02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54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05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368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365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567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145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08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323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077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5651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771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89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159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126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66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-0.0003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424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644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234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150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67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49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529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657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145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491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423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852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520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103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463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468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3650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685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56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763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89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58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96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147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76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240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85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23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859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322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1282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181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023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180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027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350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77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494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495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675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489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000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01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1609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051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415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452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2089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278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1542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263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1104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073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1991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1555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32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1766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19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56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263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347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587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99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-0.0089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215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3923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1795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27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-0.0012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09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56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-0.0039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3055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931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1756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462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-0.0066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3226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1282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-0.0104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1328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300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-0.0498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880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1286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373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566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5397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105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-0.0057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1885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066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-0.0001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054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330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127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652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121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-0.0822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-0.0276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4679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186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078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-0.0055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153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081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036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2751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1127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1398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735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078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1075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2557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119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786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1112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026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1168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139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-0.1201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997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1075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4678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332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191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1276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-0.0001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-0.0005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231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263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542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113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188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135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1344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382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092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-0.0014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252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109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007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2977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1450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1638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614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345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354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2761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255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268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334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927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-0.2044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812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-0.0655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3957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175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356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1333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27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3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196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673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4362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094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434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1382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391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002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417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1027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393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1515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055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041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2719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3932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05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48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742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99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494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92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177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2241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1274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1338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005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04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167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88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50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304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356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567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129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08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1347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1269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6253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983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0235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37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1016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1185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26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2616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1012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8745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18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0123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0698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1159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915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1075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0860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1936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1217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651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659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4224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288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01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218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138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098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078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184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478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708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272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020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957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113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5224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1207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1610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1420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2009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319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670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1722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3043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-0.0554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1650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018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-0.0263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4446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734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743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964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1516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1364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1972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3596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-0.0464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617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006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2852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285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510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035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015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010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010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005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092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017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745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326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061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2865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444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191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077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601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472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4002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536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1396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229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553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2177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016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2933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4886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1119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076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008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2752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879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268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1415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1364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2271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925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627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267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179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087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052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321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351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576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127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117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702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009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4977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336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151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084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295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036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742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2609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1181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1633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1008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897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526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350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481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522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213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1412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1008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1403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723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1126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4004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443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455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2039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106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-0.0015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-0.0629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169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541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82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-0.0042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-0.0073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-0.0005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72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2196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1562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-0.0399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82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056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054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340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360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584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21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002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-0.0909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70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3188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1009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090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017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82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032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069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719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327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529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35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78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44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477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19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269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251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11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264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512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266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445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2724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3048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636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11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280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182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037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289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995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959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1877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243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130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415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394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3238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216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385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444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743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799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2410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-0.0156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573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-0.0262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1176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-0.0070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-0.0127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4030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556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389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335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809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1042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1127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1497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1507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-0.0428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-0.0497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-0.0060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3605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-0.0190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014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014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010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017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032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080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006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753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326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040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1491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308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129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179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179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026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3113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476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1045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396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296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242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037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2356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889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853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018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079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3977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258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422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892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721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707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557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1065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062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064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088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05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287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355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531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138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845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1092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508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911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021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062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067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034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849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1264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5906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686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593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522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977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646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218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04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122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1486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1542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3804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28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0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.00.0000</text:date>, <text:time style:data-style-name="N2" text:time-value="07:14:53.485736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1T10:17:54.257367700</meta:creation-date>
    <dc:date>2026-04-13T07:18:35.450160600</dc:date>
    <meta:editing-duration>P1DT10H9M27S</meta:editing-duration>
    <meta:editing-cycles>11</meta:editing-cycles>
    <meta:generator>LibreOffice/26.2.0.3$Windows_X86_64 LibreOffice_project/620$Build-3</meta:generator>
    <meta:document-statistic meta:table-count="2" meta:cell-count="11295" meta:object-count="0"/>
  </office:meta>
</office:document-meta>
</file>